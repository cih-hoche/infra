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1.8243in"/>
    </style:style>
    <style:style style:name="Table1.B" style:family="table-column">
      <style:table-column-properties style:column-width="4.4431in"/>
    </style:style>
    <style:style style:name="Table1.1" style:family="table-row">
      <style:table-row-properties style:min-row-height="0.3889in" fo:keep-together="auto"/>
    </style:style>
    <style:style style:name="Table1.A1" style:family="table-cell">
      <style:table-cell-properties style:vertical-align="" fo:padding="0.0694in" fo:border="none"/>
    </style:style>
    <style:style style:name="Table1.19" style:family="table-row">
      <style:table-row-properties style:min-row-height="0.6181in" fo:keep-together="auto"/>
    </style:style>
    <style:style style:name="Table2" style:family="table">
      <style:table-properties style:width="4.5208in" fo:margin-left="0in" fo:margin-top="0in" fo:margin-bottom="0in" table:align="left"/>
    </style:style>
    <style:style style:name="Table2.A" style:family="table-column">
      <style:table-column-properties style:column-width="0.8056in"/>
    </style:style>
    <style:style style:name="Table2.B" style:family="table-column">
      <style:table-column-properties style:column-width="1.0868in"/>
    </style:style>
    <style:style style:name="Table2.C" style:family="table-column">
      <style:table-column-properties style:column-width="2.6285in"/>
    </style:style>
    <style:style style:name="Table2.1" style:family="table-row">
      <style:table-row-properties style:min-row-height="0.3889in" fo:keep-together="auto"/>
    </style:style>
    <style:style style:name="Table2.A1" style:family="table-cell">
      <style:table-cell-properties style:vertical-align="" fo:padding="0.0694in" fo:border="none"/>
    </style:style>
    <style:style style:name="P1" style:family="paragraph" style:parent-style-name="Heading_20_1" style:master-page-name="Standard">
      <style:paragraph-properties fo:margin-top="0.3335in" fo:margin-bottom="0.0835in" style:contextual-spacing="false" fo:line-height="100%" fo:keep-together="auto" style:page-number="1" fo:keep-with-next="auto"/>
      <style:text-properties fo:font-size="23pt" fo:font-weight="bold" style:font-size-asian="23pt" style:font-weight-asian="bold" style:font-size-complex="23pt" style:font-weight-complex="bold"/>
    </style:style>
    <style:style style:name="P2" style:family="paragraph" style:parent-style-name="Heading_20_2">
      <style:paragraph-properties fo:margin-top="0.25in" fo:margin-bottom="0.0555in" style:contextual-spacing="false" fo:line-height="100%" fo:keep-together="auto" fo:keep-with-next="auto"/>
      <style:text-properties fo:font-size="17pt" fo:font-weight="bold" style:font-size-asian="17pt" style:font-weight-asian="bold" style:font-size-complex="17pt" style:font-weight-complex="bold"/>
    </style:style>
    <style:style style:name="P3" style:family="paragraph" style:parent-style-name="Standard" style:list-style-name="WWNum1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6" style:family="paragraph" style:parent-style-name="Heading_20_3">
      <style:paragraph-properties fo:margin-top="0.1945in" fo:margin-bottom="0.0555in" style:contextual-spacing="false" fo:line-height="100%" fo:keep-together="auto" fo:keep-with-next="auto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.1665in" fo:margin-bottom="0.1665in" style:contextual-spacing="false" fo:line-height="100%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color="#188038" loext:opacity="100%" style:font-name="Roboto Mono" style:font-name-asian="Roboto Mono1" style:font-name-complex="Roboto Mono1"/>
    </style:style>
    <style:style style:name="P10" style:family="paragraph" style:parent-style-name="Standard" style:list-style-name="WWNum6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1665in" fo:margin-bottom="0.1665in" style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16" style:family="paragraph" style:parent-style-name="Heading_20_3">
      <style:paragraph-properties fo:margin-top="0.1945in" fo:margin-bottom="0.0555in" style:contextual-spacing="false" fo:text-align="left" style:justify-single-word="false" fo:keep-together="auto" fo:orphans="2" fo:widows="2" fo:keep-with-next="auto" style:writing-mode="lr-tb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top="0.1945in" fo:margin-bottom="0.0555in" style:contextual-spacing="false" fo:text-align="left" style:justify-single-word="false" fo:orphans="2" fo:widows="2" style:writing-mode="lr-tb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18" style:family="paragraph" style:parent-style-name="Code">
      <style:text-properties fo:font-style="italic" style:font-style-asian="italic" style:font-style-complex="italic"/>
    </style:style>
    <style:style style:name="P19" style:family="paragraph" style:parent-style-name="Standard">
      <style:paragraph-properties fo:margin-top="0.1665in" fo:margin-bottom="0.1665in" style:contextual-spacing="false" fo:line-height="100%"/>
      <style:text-properties fo:font-weight="bold" style:font-weight-asian="bold" style:font-weight-complex="bold"/>
    </style:style>
    <style:style style:name="P20" style:family="paragraph" style:parent-style-name="Standard" style:list-style-name="WWNum7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23" style:family="paragraph" style:parent-style-name="Heading_20_2">
      <style:paragraph-properties fo:margin-top="0.25in" fo:margin-bottom="0.0555in" style:contextual-spacing="false" fo:line-height="100%" fo:keep-together="auto" fo:keep-with-next="auto"/>
    </style:style>
    <style:style style:name="P24" style:family="paragraph" style:parent-style-name="Standard" style:list-style-name="WWNum5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9" style:family="paragraph" style:parent-style-name="Standard" style:list-style-name="WWNum4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88038" loext:opacity="100%" style:font-name="Roboto Mono" style:font-name-asian="Roboto Mono1" style:font-name-complex="Roboto Mono1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officeooo:rsid="001a166a"/>
    </style:style>
    <style:style style:name="T5" style:family="text">
      <style:text-properties fo:font-size="17pt" fo:font-weight="bold" style:font-size-asian="17pt" style:font-weight-asian="bold" style:font-size-complex="17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2ocf6iku8a84"/>Guide d'installation Arch Linux (PCs association)</text:p>
      <text:p text:style-name="P2"><text:bookmark text:name="_vovvnp2fiwuy"/>1. Préparation du support d'installation</text:p>
      <text:list text:style-name="WWNum1">
        <text:list-item>
          <text:p text:style-name="P3">Télécharger l'ISO Arch Linux : https://archlinux.org/download/</text:p>
        </text:list-item>
        <text:list-item>
          <text:p text:style-name="P4">Installer Ventoy sur une clé USB</text:p>
        </text:list-item>
        <text:list-item>
          <text:p text:style-name="P4">Copier l'ISO sur la clé Ventoy</text:p>
        </text:list-item>
        <text:list-item>
          <text:p text:style-name="P4">Désactiver <text:span text:style-name="T1">Secure Boot</text:span> et <text:span text:style-name="T1">Fast Boot</text:span> dans le BIOS</text:p>
        </text:list-item>
        <text:list-item>
          <text:p text:style-name="P5">Booter sur la clé USB depuis le PC cible</text:p>
        </text:list-item>
      </text:list>
      <text:p text:style-name="P2"><text:bookmark text:name="_8l8u5dr4xx4a"/>2. Configuration de la console live</text:p>
      <text:p text:style-name="P6"><text:bookmark text:name="_8e3yrqxiaxwd"/>Clavier, police et langue</text:p>
      <text:p text:style-name="Code">localectl list-keymaps</text:p>
      <text:p text:style-name="P7">Repérer le layout voulu (<text:span text:style-name="T2">fr</text:span>, <text:span text:style-name="T2">us</text:span>, <text:span text:style-name="T2">fr-pc</text:span>, etc.)</text:p>
      <text:p text:style-name="Code">loadkeys fr</text:p>
      <text:p text:style-name="Code">setfont ter-132b</text:p>
      <text:p text:style-name="Standard"/>
      <text:p text:style-name="P6"><text:bookmark text:name="_64oj2ywaa5ye"/>Wifi</text:p>
      <text:p text:style-name="P7">Vérifier que l'interface wifi est bien active :</text:p>
      <text:p text:style-name="Code">ip link</text:p>
      <text:p text:style-name="Standard"/>
      <text:p text:style-name="P7">Vérifier qu'elle n'est pas bloquée (soft/hard block) :</text:p>
      <text:p text:style-name="Code">rfkill list</text:p>
      <text:p text:style-name="Standard"/>
      <text:p text:style-name="P7">Voir la<text:a xlink:type="simple" xlink:href="https://wiki.archlinux.org/title/Rfkill" text:style-name="ListLabel_20_64" text:visited-style-name="ListLabel_20_64"> </text:a><text:a xlink:type="simple" xlink:href="https://wiki.archlinux.org/title/Rfkill" text:style-name="ListLabel_20_65" text:visited-style-name="ListLabel_20_65"><text:span text:style-name="T3">documentation rfkill</text:span></text:a> au besoin.</text:p>
      <text:p text:style-name="P2"><text:bookmark text:name="_w6v5rb5atcd8"/>3. Lancer archinstall</text:p>
      <text:p text:style-name="P7">Tout est prêt, on lance l'installeur guidé :</text:p>
      <text:p text:style-name="Code">archinstall</text:p>
      <text:p text:style-name="Standard"/>
      <text:p text:style-name="P6"><text:bookmark text:name="_2ty3kvhsrvq1"/>Paramètres à renseigner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8">Étape</text:p>
          </table:table-cell>
          <table:table-cell table:style-name="Table1.A1" office:value-type="string">
            <text:p text:style-name="P8">Valeur</text:p>
          </table:table-cell>
        </table:table-row>
        <table:table-row table:style-name="Table1.1">
          <table:table-cell table:style-name="Table1.A1" office:value-type="string">
            <text:p text:style-name="Standard">Langue de l'interface</text:p>
          </table:table-cell>
          <table:table-cell table:style-name="Table1.A1" office:value-type="string">
            <text:p text:style-name="Standard">Anglais (par défaut)</text:p>
          </table:table-cell>
        </table:table-row>
        <table:table-row table:style-name="Table1.1">
          <table:table-cell table:style-name="Table1.A1" office:value-type="string">
            <text:p text:style-name="Standard">Mirrors</text:p>
          </table:table-cell>
          <table:table-cell table:style-name="Table1.A1" office:value-type="string">
            <text:p text:style-name="Standard">France, World</text:p>
          </table:table-cell>
        </table:table-row>
        <table:table-row table:style-name="Table1.1">
          <table:table-cell table:style-name="Table1.A1" office:value-type="string">
            <text:p text:style-name="Standard">Keyboard layout</text:p>
          </table:table-cell>
          <table:table-cell table:style-name="Table1.A1" office:value-type="string">
            <text:p text:style-name="P9">fr</text:p>
          </table:table-cell>
        </table:table-row>
        <table:table-row table:style-name="Table1.1">
          <table:table-cell table:style-name="Table1.A1" office:value-type="string">
            <text:p text:style-name="Standard">Locale language</text:p>
          </table:table-cell>
          <table:table-cell table:style-name="Table1.A1" office:value-type="string">
            <text:p text:style-name="P9">fr_FR</text:p>
          </table:table-cell>
        </table:table-row>
        <table:table-row table:style-name="Table1.1">
          <table:table-cell table:style-name="Table1.A1" office:value-type="string">
            <text:p text:style-name="Standard">Encoding</text:p>
          </table:table-cell>
          <table:table-cell table:style-name="Table1.A1" office:value-type="string">
            <text:p text:style-name="P9">UTF-8</text:p>
          </table:table-cell>
        </table:table-row>
        <table:table-row table:style-name="Table1.1">
          <table:table-cell table:style-name="Table1.A1" office:value-type="string">
            <text:p text:style-name="Standard">Disque cible</text:p>
          </table:table-cell>
          <table:table-cell table:style-name="Table1.A1" office:value-type="string">
            <text:p text:style-name="Standard">à choisir selon le PC</text:p>
          </table:table-cell>
        </table:table-row>
        <table:table-row table:style-name="Table1.1">
          <table:table-cell table:style-name="Table1.A1" office:value-type="string">
            <text:p text:style-name="Standard">Partitionnement</text:p>
          </table:table-cell>
          <table:table-cell table:style-name="Table1.A1" office:value-type="string">
            <text:p text:style-name="Standard">Manuel</text:p>
          </table:table-cell>
        </table:table-row>
        <table:table-row table:style-name="Table1.1">
          <table:table-cell table:style-name="Table1.A1" office:value-type="string">
            <text:p text:style-name="Standard">Filesystem</text:p>
          </table:table-cell>
          <table:table-cell table:style-name="Table1.A1" office:value-type="string">
            <text:p text:style-name="Standard"><text:span text:style-name="T2">btrfs</text:span> (snapshots + compression)</text:p>
          </table:table-cell>
        </table:table-row>
        <table:table-row table:style-name="Table1.1">
          <table:table-cell table:style-name="Table1.A1" office:value-type="string">
            <text:p text:style-name="Standard">Séparation <text:span text:style-name="T2">/home</text:span></text:p>
          </table:table-cell>
          <table:table-cell table:style-name="Table1.A1" office:value-type="string">
            <text:p text:style-name="Standard">Oui, si voulue → créer <text:span text:style-name="T2">/</text:span>, <text:span text:style-name="T2">/home</text:span>, <text:span text:style-name="T2">swap</text:span> (si pas de zram)</text:p>
          </table:table-cell>
        </table:table-row>
        <table:table-row table:style-name="Table1.1">
          <table:table-cell table:style-name="Table1.A1" office:value-type="string">
            <text:p text:style-name="Standard">Disk encryption</text:p>
          </table:table-cell>
          <table:table-cell table:style-name="Table1.A1" office:value-type="string">
            <text:p text:style-name="Standard">Non</text:p>
          </table:table-cell>
        </table:table-row>
        <table:table-row table:style-name="Table1.1">
          <table:table-cell table:style-name="Table1.A1" office:value-type="string">
            <text:p text:style-name="Standard">Bootloader</text:p>
          </table:table-cell>
          <table:table-cell table:style-name="Table1.A1" office:value-type="string">
            <text:p text:style-name="P9">grub</text:p>
          </table:table-cell>
        </table:table-row>
        <table:table-row table:style-name="Table1.1">
          <table:table-cell table:style-name="Table1.A1" office:value-type="string">
            <text:p text:style-name="Standard">Kernel</text:p>
          </table:table-cell>
          <table:table-cell table:style-name="Table1.A1" office:value-type="string">
            <text:p text:style-name="Standard"><text:span text:style-name="T2">linux-lts</text:span> (plus stable que <text:span text:style-name="T2">linux</text:span>)</text:p>
          </table:table-cell>
        </table:table-row>
        <table:table-row table:style-name="Table1.1">
          <table:table-cell table:style-name="Table1.A1" office:value-type="string">
            <text:p text:style-name="Standard">Hostname</text:p>
          </table:table-cell>
          <table:table-cell table:style-name="Table1.A1" office:value-type="string">
            <text:p text:style-name="Standard">même valeur que l'étiquette du PC (ex : <text:span text:style-name="T2">archlinux-cih-001</text:span>)</text:p>
          </table:table-cell>
        </table:table-row>
        <table:table-row table:style-name="Table1.1">
          <table:table-cell table:style-name="Table1.A1" office:value-type="string">
            <text:p text:style-name="Standard">Profile type</text:p>
          </table:table-cell>
          <table:table-cell table:style-name="Table1.A1" office:value-type="string">
            <text:p text:style-name="Standard">Desktop</text:p>
          </table:table-cell>
        </table:table-row>
        <table:table-row table:style-name="Table1.1">
          <table:table-cell table:style-name="Table1.A1" office:value-type="string">
            <text:p text:style-name="Standard">Environnement</text:p>
          </table:table-cell>
          <table:table-cell table:style-name="Table1.A1" office:value-type="string">
            <text:p text:style-name="Standard">KDE Plasma</text:p>
          </table:table-cell>
        </table:table-row>
        <table:table-row table:style-name="Table1.1">
          <table:table-cell table:style-name="Table1.A1" office:value-type="string">
            <text:p text:style-name="Standard">Login manager</text:p>
          </table:table-cell>
          <table:table-cell table:style-name="Table1.A1" office:value-type="string">
            <text:p text:style-name="Standard">SDDM</text:p>
          </table:table-cell>
        </table:table-row>
        <table:table-row table:style-name="Table1.1">
          <table:table-cell table:style-name="Table1.A1" office:value-type="string">
            <text:p text:style-name="Standard">Audio</text:p>
          </table:table-cell>
          <table:table-cell table:style-name="Table1.A1" office:value-type="string">
            <text:p text:style-name="Standard">pipewire</text:p>
          </table:table-cell>
        </table:table-row>
        <table:table-row table:style-name="Table1.19">
          <table:table-cell table:style-name="Table1.A1" office:value-type="string">
            <text:p text:style-name="Standard">Network configuration</text:p>
          </table:table-cell>
          <table:table-cell table:style-name="Table1.A1" office:value-type="string">
            <text:p text:style-name="Standard">NetworkManager <text:span text:style-name="T1">seulement</text:span></text:p>
          </table:table-cell>
        </table:table-row>
        <table:table-row table:style-name="Table1.19">
          <table:table-cell table:style-name="Table1.A1" office:value-type="string">
            <text:p text:style-name="Standard">Additional packages</text:p>
          </table:table-cell>
          <table:table-cell table:style-name="Table1.A1" office:value-type="string">
            <text:p text:style-name="Standard"><text:span text:style-name="T2">git base-devel neovim</text:span> (le reste sera installé après, voir plus bas)</text:p>
          </table:table-cell>
        </table:table-row>
        <table:table-row table:style-name="Table1.1">
          <table:table-cell table:style-name="Table1.A1" office:value-type="string">
            <text:p text:style-name="Standard">Timezone</text:p>
          </table:table-cell>
          <table:table-cell table:style-name="Table1.A1" office:value-type="string">
            <text:p text:style-name="P9">Europe/Paris</text:p>
          </table:table-cell>
        </table:table-row>
      </table:table>
      <text:p text:style-name="P6"><text:bookmark text:name="_cy374shtrdfo"/>Comptes utilisateurs à créer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Compte</text:p>
          </table:table-cell>
          <table:table-cell table:style-name="Table2.A1" office:value-type="string">
            <text:p text:style-name="P8">Droits</text:p>
          </table:table-cell>
          <table:table-cell table:style-name="Table2.A1" office:value-type="string">
            <text:p text:style-name="P8">Usage</text:p>
          </table:table-cell>
        </table:table-row>
        <text:soft-page-break/>
        <table:table-row table:style-name="Table2.1">
          <table:table-cell table:style-name="Table2.A1" office:value-type="string">
            <text:p text:style-name="P9">admin</text:p>
          </table:table-cell>
          <table:table-cell table:style-name="Table2.A1" office:value-type="string">
            <text:p text:style-name="Standard">sudo</text:p>
          </table:table-cell>
          <table:table-cell table:style-name="Table2.A1" office:value-type="string">
            <text:p text:style-name="Standard">administration, gestion des PCs</text:p>
          </table:table-cell>
        </table:table-row>
        <table:table-row table:style-name="Table2.1">
          <table:table-cell table:style-name="Table2.A1" office:value-type="string">
            <text:p text:style-name="P9">user</text:p>
          </table:table-cell>
          <table:table-cell table:style-name="Table2.A1" office:value-type="string">
            <text:p text:style-name="Standard">pas de sudo</text:p>
          </table:table-cell>
          <table:table-cell table:style-name="Table2.A1" office:value-type="string">
            <text:p text:style-name="Standard">membres</text:p>
          </table:table-cell>
        </table:table-row>
        <table:table-row table:style-name="Table2.1">
          <table:table-cell table:style-name="Table2.A1" office:value-type="string">
            <text:p text:style-name="P9">guest</text:p>
          </table:table-cell>
          <table:table-cell table:style-name="Table2.A1" office:value-type="string">
            <text:p text:style-name="Standard">pas de sudo</text:p>
          </table:table-cell>
          <table:table-cell table:style-name="Table2.A1" office:value-type="string">
            <text:p text:style-name="Standard">personnes accompagnées</text:p>
          </table:table-cell>
        </table:table-row>
      </table:table>
      <text:p text:style-name="P7">Une fois le résumé vérifié → confirmer → lancer l'installation.</text:p>
      <text:p text:style-name="P2"><text:bookmark text:name="_jdrv82xe3lap"/>4. Fin d'installation</text:p>
      <text:list text:style-name="WWNum6">
        <text:list-item>
          <text:p text:style-name="P10"><text:span text:style-name="T2">archinstall</text:span> propose de chrooter dans le nouveau système → accepter si des ajustements sont nécessaires avant reboot, sinon quitter</text:p>
        </text:list-item>
        <text:list-item>
          <text:p text:style-name="P11">Lancer :</text:p>
        </text:list-item>
      </text:list>
      <text:p text:style-name="Code">reboot</text:p>
      <text:p text:style-name="Standard"/>
      <text:list text:style-name="WWNum2">
        <text:list-item>
          <text:p text:style-name="P12">Retirer la clé USB pendant le redémarrage</text:p>
        </text:list-item>
      </text:list>
      <text:p text:style-name="P2"><text:bookmark text:name="_9ir9d2t4q9cn"/>5. Premier boot</text:p>
      <text:list text:style-name="WWNum3">
        <text:list-item>
          <text:p text:style-name="P13">Se connecter avec le compte <text:span text:style-name="T2">admin</text:span></text:p>
        </text:list-item>
        <text:list-item>
          <text:p text:style-name="P14">Activer le wifi via l'applet réseau KDE (si pas déjà fait)</text:p>
        </text:list-item>
        <text:list-item>
          <text:p text:style-name="P15">Mettre à jour le système :</text:p>
        </text:list-item>
      </text:list>
      <text:p text:style-name="Code">sudo pacman -Syu</text:p>
      <text:p text:style-name="Standard"/>
      <text:p text:style-name="P2"><text:bookmark text:name="_xnjtjh6bb8yk"/>6. Post-installation</text:p>
      <text:p text:style-name="P16">Ne pas <text:span text:style-name="T4">s’embêter (utiliser le script de post install)</text:span></text:p>
      <text:p text:style-name="P17"/>
      <text:p text:style-name="P6"><text:bookmark text:name="_olpbifjn2ttp"/>Installer yay (AUR helper)</text:p>
      <text:p text:style-name="Code">sudo pacman -S --needed git base-devel</text:p>
      <text:p text:style-name="Code">git clone https://aur.archlinux.org/yay.git</text:p>
      <text:p text:style-name="Code">cd yay &amp;&amp; makepkg -si</text:p>
      <text:p text:style-name="Standard"/>
      <text:p text:style-name="P6"><text:bookmark text:name="_4b8gd5krancd"/>Installer Plymouth</text:p>
      <text:p text:style-name="P7">Pour un écran de boot plus propre (thème au choix).</text:p>
      <text:p text:style-name="P6"><text:bookmark text:name="_ru92tjft07q1"/>Mettre en place Timeshift + grub-btrfs</text:p>
      <text:p text:style-name="Code">sudo timeshift --create</text:p>
      <text:p text:style-name="P7"><text:soft-page-break/><text:span text:style-name="T2">grub-btrfs</text:span> permet de booter directement sur un snapshot depuis le menu GRUB en cas de système cassé.</text:p>
      <text:p text:style-name="Code">yay -S grub-btrfs inotify-tools</text:p>
      <text:p text:style-name="Code">sudo systemctl enable --now grub-btrfsd</text:p>
      <text:p text:style-name="Standard"/>
      <text:p text:style-name="P6"><text:bookmark text:name="_kwapimrmgvu2"/>Snapshot automatique avant chaque mise à jour (hook pacman)</text:p>
      <text:p text:style-name="P7">Créer le hook :</text:p>
      <text:p text:style-name="Code">sudo mkdir -p /etc/pacman.d/hooks</text:p>
      <text:p text:style-name="Code">sudo nvim /etc/pacman.d/hooks/timeshift-snapshot.hook</text:p>
      <text:p text:style-name="Standard"/>
      <text:p text:style-name="P7">Contenu du fichier :</text:p>
      <text:p text:style-name="P18">[Trigger]</text:p>
      <text:p text:style-name="P18">Operation = Upgrade</text:p>
      <text:p text:style-name="P18">Operation = Install</text:p>
      <text:p text:style-name="P18">Operation = Remove</text:p>
      <text:p text:style-name="P18">Type = Package</text:p>
      <text:p text:style-name="P18">Target = *</text:p>
      <text:p text:style-name="P18"/>
      <text:p text:style-name="P18">[Action]</text:p>
      <text:p text:style-name="P18">Description = Création d'un snapshot Timeshift avant modification des paquets...</text:p>
      <text:p text:style-name="P18">When = PreTransaction</text:p>
      <text:p text:style-name="P18">Exec = /usr/bin/timeshift --create --comments "Avant pacman -Syu" --tags D</text:p>
      <text:p text:style-name="P18">Depends = timeshift</text:p>
      <text:p text:style-name="Standard"/>
      <text:p text:style-name="P19">Explications :</text:p>
      <text:list text:style-name="WWNum7">
        <text:list-item>
          <text:p text:style-name="P20"><text:span text:style-name="T2">When = PreTransaction</text:span> → le snapshot se crée <text:span text:style-name="T1">avant</text:span> toute modification par pacman</text:p>
        </text:list-item>
        <text:list-item>
          <text:p text:style-name="P21"><text:span text:style-name="T2">Target = *</text:span> → réagit à n'importe quel paquet</text:p>
        </text:list-item>
        <text:list-item>
          <text:p text:style-name="P21"><text:span text:style-name="T2">--tags D</text:span> → tag "on-demand", évite de polluer la rotation horaire/journalière</text:p>
        </text:list-item>
        <text:list-item>
          <text:p text:style-name="P22"><text:span text:style-name="T2">Depends = timeshift</text:span> → pacman s'assure que Timeshift est installé avant d'exécuter le hook</text:p>
        </text:list-item>
      </text:list>
      <text:p text:style-name="P7">À partir de là, chaque <text:span text:style-name="T2">sudo pacman -Syu</text:span> déclenchera automatiquement un snapshot.</text:p>
      <text:p text:style-name="P6"><text:bookmark text:name="_pplvs1hq2lds"/>Installer les logiciels de base</text:p>
      <text:p text:style-name="Code">sudo yay -Syu &amp;&amp; \</text:p>
      <text:p text:style-name="Code">sudo yay -S tldr man timeshift git thunderbird blender ghostty dolphin nvim visual-studio-code-bin libreoffice-fresh gwenview vlc okular krita gimp inkscape chromium firefox firefox-ublock-origin krdp remmina qbittorrent kdenlive obs-studio btop</text:p>
      <text:p text:style-name="Standard"/>
      <text:p text:style-name="P23"><text:bookmark text:name="_ba9hykevtht4"/><text:soft-page-break/><text:span text:style-name="T5">7. Que faire en cas de problème (boot plus, etc.) ?</text:span></text:p>
      <text:p text:style-name="P6"><text:bookmark text:name="_r39v6a7z2s4v"/>Le système démarre encore</text:p>
      <text:p text:style-name="P7">Restaurer un snapshot antérieur depuis une session fonctionnelle :</text:p>
      <text:p text:style-name="Code">sudo timeshift --restore</text:p>
      <text:p text:style-name="Standard"/>
      <text:p text:style-name="P7">Suivre les instructions à l'écran pour choisir le snapshot à restaurer.</text:p>
      <text:p text:style-name="P6"><text:bookmark text:name="_8nyad6fi97qp"/>Le système ne démarre plus du tout</text:p>
      <text:p text:style-name="P7">Grâce à <text:span text:style-name="T2">grub-btrfs</text:span>, une entrée est automatiquement ajoutée dans le menu GRUB pour chaque snapshot Timeshift :</text:p>
      <text:list text:style-name="WWNum5">
        <text:list-item>
          <text:p text:style-name="P24">Au démarrage, dans le menu GRUB, choisir <text:span text:style-name="T1">"Arch Linux snapshots"</text:span></text:p>
        </text:list-item>
        <text:list-item>
          <text:p text:style-name="P25">Sélectionner un snapshot antérieur au problème</text:p>
        </text:list-item>
        <text:list-item>
          <text:p text:style-name="P25">Booter dessus pour vérifier que tout fonctionne</text:p>
        </text:list-item>
        <text:list-item>
          <text:p text:style-name="P26">Une fois dans le système, restaurer définitivement ce snapshot avec <text:span text:style-name="T2">sudo timeshift --restore</text:span>, puis redémarrer normalement</text:p>
        </text:list-item>
      </text:list>
      <text:p text:style-name="P6"><text:bookmark text:name="_1sr7lez653sh"/>Si rien ne fonctionne</text:p>
      <text:p text:style-name="P7">Utiliser la clé Ventoy pour booter en live USB, monter la partition btrfs, et restaurer un snapshot manuellement, ou réinstaller depuis ce guide en dernier recours.</text:p>
      <text:p text:style-name="P6"><text:bookmark text:name="_7pd0idgk030y"/>Dans tous les cas</text:p>
      <text:p text:style-name="P7">En cas de doute, de blocage, ou de casse importante : <text:span text:style-name="T1">ne pas essayer de tout réparer seul(e)</text:span> — soumettre une demande sur le Discord de l'association pour obtenir de l'aide.</text:p>
      <text:p text:style-name="P2"><text:bookmark text:name="_b0k33vpa3hdo"/>8. Installer des packages ?</text:p>
      <text:p text:style-name="P7">Les comptes <text:span text:style-name="T2">user</text:span> et <text:span text:style-name="T2">guest</text:span> n'ont pas les droits <text:span text:style-name="T2">sudo</text:span> et ne peuvent donc pas installer de logiciels eux-mêmes. Si un logiciel manque ou est nécessaire pour un projet :</text:p>
      <text:list text:style-name="WWNum4">
        <text:list-item>
          <text:p text:style-name="P27">Vérifier que le logiciel n'est pas déjà installé (menu KDE / <text:span text:style-name="T2">which &lt;nom_du_programme&gt;</text:span>)</text:p>
        </text:list-item>
        <text:list-item>
          <text:p text:style-name="P28">Soumettre une demande sur le Discord de l'association, en précisant :</text:p>
          <text:list>
            <text:list-item>
              <text:p text:style-name="P29">le nom du logiciel souhaité</text:p>
            </text:list-item>
            <text:list-item>
              <text:p text:style-name="P29">le PC concerné (nom de la machine)</text:p>
            </text:list-item>
            <text:list-item>
              <text:p text:style-name="P29">la raison de la demande (projet, cours, etc.)</text:p>
            </text:list-item>
          </text:list>
        </text:list-item>
        <text:list-item>
          <text:p text:style-name="P30">Un membre <text:span text:style-name="T2">admin</text:span> se chargera de l'installation via <text:span text:style-name="T2">yay</text:span>/<text:span text:style-name="T2">pacman</text:span> et confirmera une fois fait</text:p>
        </text:list-item>
      </text:list>
      <text:p text:style-name="P7">Cette procédure permet de garder une trace des logiciels installés sur chaque machine et d'éviter les installations sauvages qui pourraient déstabiliser le système partagé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draw:hatch draw:name="Red_20_90_20_Degrees_20_Crossed_20_1" draw:display-name="Red 90 Degrees Crossed 1" draw:style="single" draw:color="#999999" draw:distance="0.0795in" draw:rotation="450"/>
    <draw:hatch draw:name="Red_20_90_20_Degrees_20_Crossed_20_2" draw:display-name="Red 90 Degrees Crossed 2" draw:style="single" draw:color="#666666" draw:distance="0.0795in" draw:rotation="45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lef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master-page-name="">
      <loext:graphic-properties draw:fill="none" draw:fill-color="#666666" draw:fill-hatch-name="Red_20_90_20_Degrees_20_Crossed_20_2" draw:fill-hatch-solid="true"/>
      <style:paragraph-properties fo:margin-left="0.1in" style:page-number="auto" fo:background-color="transparent" fo:padding="0.0201in" fo:border="0.06pt solid #000000">
        <style:tab-stops/>
      </style:paragraph-properties>
      <style:text-properties style:use-window-font-color="true" loext:opacity="0%" fo:background-color="transparen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uide d’installation et d’utilisation d’arch simplifié - A.C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dc:date>2026-07-16T20:44:24.415090461</dc:date>
    <meta:editing-duration>PT9M50S</meta:editing-duration>
    <meta:editing-cycles>13</meta:editing-cycles>
    <meta:document-statistic meta:table-count="2" meta:image-count="0" meta:object-count="0" meta:page-count="5" meta:paragraph-count="152" meta:word-count="873" meta:character-count="5419" meta:non-whitespace-character-count="4731"/>
  </office:meta>
</office:document-meta>
</file>